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6000000D2AA60D93F.png" manifest:media-type="image/png"/>
  <manifest:file-entry manifest:full-path="Pictures/1000000000000319000002D14109FE4F.png" manifest:media-type="image/png"/>
  <manifest:file-entry manifest:full-path="Pictures/100000000000034600000204B89480C3.png" manifest:media-type="image/png"/>
  <manifest:file-entry manifest:full-path="Pictures/100000000000039200000274B413D7D0.png" manifest:media-type="image/png"/>
  <manifest:file-entry manifest:full-path="Pictures/100000000000067500000923F92EF6BE.jpg" manifest:media-type="image/jpeg"/>
  <manifest:file-entry manifest:full-path="Pictures/100000000000038A000002126798E6E3.png" manifest:media-type="image/png"/>
  <manifest:file-entry manifest:full-path="Pictures/100000000000034B000001D1755221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, 'Aptos EmbeddedFont', 'Aptos MSFontService', Calibri, Helvetica, sans-serif"/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5.58cm" fo:margin-left="0.709cm" fo:margin-top="0cm" fo:margin-bottom="0cm" table:align="left" style:writing-mode="page"/>
    </style:style>
    <style:style style:name="Tabela1.A" style:family="table-column">
      <style:table-column-properties style:column-width="7.426cm"/>
    </style:style>
    <style:style style:name="Tabela1.B" style:family="table-column">
      <style:table-column-properties style:column-width="8.15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1.B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indent="0cm" style:auto-text-indent="false"/>
    </style:style>
    <style:style style:name="P2" style:family="paragraph" style:parent-style-name="Standard">
      <style:paragraph-properties fo:text-indent="0cm" style:auto-text-indent="false"/>
    </style:style>
    <style:style style:name="P3" style:family="paragraph" style:parent-style-name="Standard">
      <style:paragraph-properties fo:margin-top="0cm" fo:margin-bottom="0.494cm" style:contextual-spacing="false" fo:text-indent="0cm" style:auto-text-indent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ing_20_6">
      <style:paragraph-properties fo:margin-top="0cm" fo:margin-bottom="0cm" style:contextual-spacing="false" fo:break-before="page"/>
    </style:style>
    <style:style style:name="P6" style:family="paragraph" style:parent-style-name="Normal_20__28_Web_29_">
      <style:paragraph-properties fo:margin-left="1.501cm" fo:line-height="150%" fo:text-indent="-0.501cm" style:auto-text-indent="false"/>
    </style:style>
    <style:style style:name="P7" style:family="paragraph" style:parent-style-name="Normal_20__28_Web_29_">
      <style:paragraph-properties fo:margin-left="1.501cm" fo:margin-top="0cm" fo:margin-bottom="0cm" style:contextual-spacing="false" fo:line-height="150%" fo:text-indent="-0.501cm" style:auto-text-indent="false"/>
    </style:style>
    <style:style style:name="P8" style:family="paragraph" style:parent-style-name="Pa13">
      <style:paragraph-properties fo:line-height="150%" fo:text-align="justify" style:justify-single-word="false" fo:text-indent="1cm" style:auto-text-indent="false"/>
    </style:style>
    <style:style style:name="P9" style:family="paragraph" style:parent-style-name="Standard">
      <style:paragraph-properties fo:text-align="center" style:justify-single-word="false" fo:text-indent="0cm" style:auto-text-indent="false"/>
    </style:style>
    <style:style style:name="P10" style:family="paragraph" style:parent-style-name="Standard">
      <style:paragraph-properties fo:line-height="100%" fo:text-align="start" style:justify-single-word="false" fo:text-indent="0cm" style:auto-text-indent="false"/>
    </style:style>
    <style:style style:name="P11" style:family="paragraph" style:parent-style-name="Standard">
      <style:paragraph-properties fo:text-indent="2.54cm" style:auto-text-indent="false"/>
    </style:style>
    <style:style style:name="P12" style:family="paragraph" style:parent-style-name="Standard">
      <style:paragraph-properties fo:text-indent="1cm" style:auto-text-indent="false"/>
    </style:style>
    <style:style style:name="P13" style:family="paragraph" style:parent-style-name="Standard">
      <style:paragraph-properties fo:margin-left="1.501cm" fo:text-align="start" style:justify-single-word="false" fo:text-indent="-0.501cm" style:auto-text-indent="false"/>
    </style:style>
    <style:style style:name="P14" style:family="paragraph" style:parent-style-name="Standard">
      <style:paragraph-properties fo:margin-left="1.501cm" fo:text-indent="-0.501cm" style:auto-text-indent="false"/>
    </style:style>
    <style:style style:name="P15" style:family="paragraph" style:parent-style-name="Standard">
      <style:paragraph-properties fo:margin-left="1.752cm" fo:text-indent="-0.501cm" style:auto-text-indent="false"/>
    </style:style>
    <style:style style:name="P16" style:family="paragraph" style:parent-style-name="Standard">
      <style:paragraph-properties fo:text-indent="1.251cm" style:auto-text-indent="false"/>
    </style:style>
    <style:style style:name="P17" style:family="paragraph" style:parent-style-name="Standard">
      <style:paragraph-properties fo:margin-left="1cm" fo:text-indent="1.501cm" style:auto-text-indent="false"/>
    </style:style>
    <style:style style:name="P18" style:family="paragraph" style:parent-style-name="Standard">
      <style:paragraph-properties fo:margin-left="0.011cm" fo:text-indent="1.249cm" style:auto-text-indent="false"/>
    </style:style>
    <style:style style:name="P19" style:family="paragraph" style:parent-style-name="Standard">
      <style:paragraph-properties fo:margin-left="0.007cm" fo:text-indent="1.249cm" style:auto-text-indent="false"/>
    </style:style>
    <style:style style:name="P20" style:family="paragraph" style:parent-style-name="Standard">
      <style:paragraph-properties fo:margin-top="0cm" fo:margin-bottom="0.494cm" style:contextual-spacing="false"/>
    </style:style>
    <style:style style:name="P21" style:family="paragraph" style:parent-style-name="Heading_20_7">
      <style:text-properties style:font-size-complex="12pt"/>
    </style:style>
    <style:style style:name="P22" style:family="paragraph" style:parent-style-name="Heading_20_7">
      <style:paragraph-properties fo:margin-top="0cm" fo:margin-bottom="0cm" style:contextual-spacing="false" fo:break-before="page">
        <style:tab-stops>
          <style:tab-stop style:position="1.501cm"/>
        </style:tab-stops>
      </style:paragraph-properties>
    </style:style>
    <style:style style:name="P23" style:family="paragraph" style:parent-style-name="Text">
      <style:paragraph-properties fo:text-indent="0cm" style:auto-text-indent="false"/>
    </style:style>
    <style:style style:name="P24" style:family="paragraph" style:parent-style-name="Text_20_body_20__28_WW_29_">
      <style:paragraph-properties fo:text-align="center" style:justify-single-word="false"/>
      <style:text-properties style:font-name="Times New Roman" style:font-name-complex="Times New Roman1"/>
    </style:style>
    <style:style style:name="P25" style:family="paragraph" style:parent-style-name="CP-CapaOrientador">
      <style:paragraph-properties fo:margin-left="8.001cm" fo:margin-top="0cm" fo:margin-bottom="0cm" style:contextual-spacing="false" fo:text-align="justify" style:justify-single-word="false" fo:text-indent="0cm" style:auto-text-indent="false"/>
    </style:style>
    <style:style style:name="P26" style:family="paragraph" style:parent-style-name="Standard_20__28_WW_29_">
      <style:paragraph-properties fo:text-align="center" style:justify-single-word="false" fo:text-indent="0cm" style:auto-text-indent="false"/>
    </style:style>
    <style:style style:name="P27" style:family="paragraph" style:parent-style-name="Standard_20__28_WW_29_" style:master-page-name="Converted2">
      <style:paragraph-properties fo:text-align="center" style:justify-single-word="false" fo:text-indent="0cm" style:auto-text-indent="false" style:page-number="16"/>
      <style:text-properties officeooo:paragraph-rsid="00103301"/>
    </style:style>
    <style:style style:name="P28" style:family="paragraph" style:parent-style-name="Standard_20__28_WW_29_">
      <style:paragraph-properties fo:text-align="center" style:justify-single-word="false" fo:text-indent="0cm" style:auto-text-indent="false"/>
      <style:text-properties officeooo:paragraph-rsid="00103301"/>
    </style:style>
    <style:style style:name="P29" style:family="paragraph" style:parent-style-name="Standard_20__28_WW_29_">
      <style:paragraph-properties fo:text-align="center" style:justify-single-word="false" fo:text-indent="0cm" style:auto-text-indent="false"/>
      <style:text-properties officeooo:rsid="000ff4d8" officeooo:paragraph-rsid="000ff4d8"/>
    </style:style>
    <style:style style:name="P30" style:family="paragraph" style:parent-style-name="Standard_20__28_WW_29_">
      <style:paragraph-properties fo:text-align="center" style:justify-single-word="false" fo:text-indent="0cm" style:auto-text-indent="false"/>
      <style:text-properties officeooo:rsid="000ff4d8" officeooo:paragraph-rsid="00103301"/>
    </style:style>
    <style:style style:name="P31" style:family="paragraph" style:parent-style-name="Standard_20__28_WW_29_">
      <style:paragraph-properties fo:text-align="center" style:justify-single-word="false" fo:text-indent="0cm" style:auto-text-indent="false"/>
      <style:text-properties style:font-name="Times New Roman" style:font-name-complex="Times New Roman1"/>
    </style:style>
    <style:style style:name="P32" style:family="paragraph" style:parent-style-name="Standard_20__28_WW_29_">
      <style:paragraph-properties fo:margin-left="3cm" fo:margin-right="2cm" fo:text-align="center" style:justify-single-word="false" fo:text-indent="0cm" style:auto-text-indent="false"/>
      <style:text-properties style:font-name="Times New Roman" style:font-name-complex="Times New Roman1"/>
    </style:style>
    <style:style style:name="P33" style:family="paragraph" style:parent-style-name="Standard_20__28_WW_29_">
      <style:paragraph-properties fo:text-indent="0cm" style:auto-text-indent="false"/>
      <style:text-properties style:font-name="Times New Roman" style:font-name-complex="Times New Roman1"/>
    </style:style>
    <style:style style:name="P34" style:family="paragraph" style:parent-style-name="Standard_20__28_WW_29_">
      <style:paragraph-properties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35" style:family="paragraph" style:parent-style-name="Standard_20__28_WW_29_">
      <style:paragraph-properties fo:line-height="100%" fo:text-align="center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36" style:family="paragraph" style:parent-style-name="Standard_20__28_WW_29_">
      <style:paragraph-properties fo:line-height="100%" fo:text-align="center" style:justify-single-word="false">
        <style:tab-stops>
          <style:tab-stop style:position="5.752cm"/>
        </style:tab-stops>
      </style:paragraph-properties>
      <style:text-properties style:font-name="Times New Roman" fo:font-size="11pt" style:font-size-asian="11pt" style:font-name-complex="Times New Roman1"/>
    </style:style>
    <style:style style:name="P37" style:family="paragraph" style:parent-style-name="Standard_20__28_WW_29_">
      <style:paragraph-properties fo:margin-left="8.001cm" fo:line-height="100%" fo:text-indent="0cm" style:auto-text-indent="false">
        <style:tab-stops>
          <style:tab-stop style:position="13.753cm"/>
        </style:tab-stops>
      </style:paragraph-properties>
    </style:style>
    <style:style style:name="P38" style:family="paragraph" style:parent-style-name="Standard_20__28_WW_29_">
      <style:paragraph-properties fo:text-align="center" style:justify-single-word="false" fo:text-indent="0cm" style:auto-text-indent="false"/>
      <style:text-properties officeooo:rsid="00103301" officeooo:paragraph-rsid="00103301"/>
    </style:style>
    <style:style style:name="P39" style:family="paragraph" style:parent-style-name="Header">
      <style:paragraph-properties fo:text-align="end" style:justify-single-word="false"/>
      <style:text-properties fo:font-size="11pt" style:font-size-asian="11pt"/>
    </style:style>
    <style:style style:name="P40" style:family="paragraph" style:parent-style-name="Header">
      <style:paragraph-properties fo:text-align="end" style:justify-single-word="false"/>
    </style:style>
    <style:style style:name="P41" style:family="paragraph" style:parent-style-name="Header">
      <style:paragraph-properties fo:text-indent="0cm" style:auto-text-indent="false"/>
      <style:text-properties fo:font-size="9.5pt" style:font-size-asian="9.5pt" style:font-size-complex="9.5pt"/>
    </style:style>
    <style:style style:name="P42" style:family="paragraph" style:parent-style-name="Heading_20_1" style:master-page-name="Converted4">
      <style:paragraph-properties fo:margin-left="0cm" fo:text-indent="0cm" style:auto-text-indent="false" style:page-number="15"/>
    </style:style>
    <style:style style:name="P43" style:family="paragraph" style:parent-style-name="Heading_20_1">
      <style:paragraph-properties fo:margin-left="0cm" fo:text-indent="0cm" style:auto-text-indent="false"/>
    </style:style>
    <style:style style:name="P44" style:family="paragraph" style:parent-style-name="Heading_20_1">
      <style:paragraph-properties fo:margin-left="0cm" fo:margin-top="0cm" fo:margin-bottom="0cm" style:contextual-spacing="false" fo:text-indent="0cm" style:auto-text-indent="false" fo:break-before="page"/>
    </style:style>
    <style:style style:name="P45" style:family="paragraph" style:parent-style-name="Heading_20_1" style:list-style-name="">
      <style:paragraph-properties fo:margin-left="0cm" fo:text-indent="0cm" style:auto-text-indent="false"/>
    </style:style>
    <style:style style:name="P46" style:family="paragraph" style:parent-style-name="Heading_20_2">
      <style:paragraph-properties fo:margin-left="0cm" fo:text-indent="0cm" style:auto-text-indent="false"/>
    </style:style>
    <style:style style:name="P47" style:family="paragraph" style:parent-style-name="Heading_20_2" style:list-style-name="">
      <style:paragraph-properties fo:margin-left="0cm" fo:text-indent="0cm" style:auto-text-indent="false"/>
    </style:style>
    <style:style style:name="P48" style:family="paragraph" style:parent-style-name="Heading_20_3">
      <style:paragraph-properties fo:margin-left="0cm" fo:text-indent="0cm" style:auto-text-indent="false"/>
    </style:style>
    <style:style style:name="P49" style:family="paragraph" style:parent-style-name="Heading_20_3">
      <style:paragraph-properties fo:margin-left="0.002cm" fo:text-indent="0cm" style:auto-text-indent="false"/>
    </style:style>
    <style:style style:name="P50" style:family="paragraph" style:parent-style-name="No_20_Spacing" style:list-style-name="WWNum16"/>
    <style:style style:name="P51" style:family="paragraph" style:parent-style-name="No_20_Spacing" style:list-style-name="WWNum16">
      <style:text-properties officeooo:paragraph-rsid="0026f5bb"/>
    </style:style>
    <style:style style:name="P52" style:family="paragraph" style:parent-style-name="No_20_Spacing" style:list-style-name="">
      <style:paragraph-properties fo:margin-left="2.27cm" fo:text-indent="0cm" style:auto-text-indent="false"/>
      <style:text-properties fo:font-weight="bold" style:font-weight-asian="bold"/>
    </style:style>
    <style:style style:name="P53" style:family="paragraph" style:parent-style-name="Nota_20_de_20_Rodapé">
      <style:paragraph-properties fo:text-indent="0cm" style:auto-text-indent="false"/>
    </style:style>
    <style:style style:name="P54" style:family="paragraph" style:parent-style-name="Standard" style:master-page-name="Converted1">
      <style:paragraph-properties fo:text-align="center" style:justify-single-word="false" fo:text-indent="0cm" style:auto-text-indent="false" style:page-number="27"/>
    </style:style>
    <style:style style:name="P55" style:family="paragraph" style:parent-style-name="Standard">
      <style:paragraph-properties fo:text-align="center" style:justify-single-word="false" fo:text-indent="0cm" style:auto-text-indent="false"/>
    </style:style>
    <style:style style:name="P56" style:family="paragraph" style:parent-style-name="Standard">
      <style:paragraph-properties fo:line-height="100%" fo:text-align="center" style:justify-single-word="false" fo:text-indent="0cm" style:auto-text-indent="false"/>
    </style:style>
    <style:style style:name="P57" style:family="paragraph" style:parent-style-name="Standard">
      <style:paragraph-properties fo:margin-left="0.501cm" fo:line-height="100%" fo:text-indent="0.499cm" style:auto-text-indent="false"/>
    </style:style>
    <style:style style:name="P58" style:family="paragraph" style:parent-style-name="Standard">
      <style:text-properties style:font-size-complex="12pt"/>
    </style:style>
    <style:style style:name="P59" style:family="paragraph" style:parent-style-name="Standard">
      <style:paragraph-properties fo:margin-left="0.004cm" fo:text-indent="1.501cm" style:auto-text-indent="false"/>
      <style:text-properties style:font-size-complex="12pt"/>
    </style:style>
    <style:style style:name="P60" style:family="paragraph" style:parent-style-name="Standard">
      <style:paragraph-properties fo:text-indent="0cm" style:auto-text-indent="false"/>
      <style:text-properties style:font-size-complex="12pt"/>
    </style:style>
    <style:style style:name="P61" style:family="paragraph" style:parent-style-name="Standard">
      <style:paragraph-properties fo:margin-top="0cm" fo:margin-bottom="0.353cm" style:contextual-spacing="false" fo:line-height="115%" fo:text-align="start" style:justify-single-word="false" fo:text-indent="0cm" style:auto-text-indent="false"/>
      <style:text-properties style:font-size-complex="12pt"/>
    </style:style>
    <style:style style:name="P62" style:family="paragraph" style:parent-style-name="Standard">
      <style:paragraph-properties fo:line-height="100%" fo:text-indent="-0.501cm" style:auto-text-indent="false"/>
      <style:text-properties fo:font-weight="bold" style:font-weight-asian="bold" style:font-size-complex="12pt"/>
    </style:style>
    <style:style style:name="P63" style:family="paragraph" style:parent-style-name="Standard">
      <style:paragraph-properties fo:text-indent="0cm" style:auto-text-indent="false"/>
    </style:style>
    <style:style style:name="P64" style:family="paragraph" style:parent-style-name="Standard">
      <style:text-properties style:font-name="Arial" style:font-name-complex="Arial1" style:font-size-complex="12pt"/>
    </style:style>
    <style:style style:name="P65" style:family="paragraph" style:parent-style-name="Standard">
      <style:paragraph-properties fo:text-indent="0cm" style:auto-text-indent="false"/>
      <style:text-properties style:font-name="Arial" style:font-name-complex="Arial1" style:font-size-complex="12pt"/>
    </style:style>
    <style:style style:name="P66" style:family="paragraph" style:parent-style-name="Standard" style:list-style-name="WWNum19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 style:list-style-name="WWNum19">
      <style:paragraph-properties fo:text-align="start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text-indent="1cm" style:auto-text-indent="false"/>
    </style:style>
    <style:style style:name="P69" style:family="paragraph" style:parent-style-name="Standard">
      <style:paragraph-properties>
        <style:tab-stops>
          <style:tab-stop style:position="9.001cm"/>
        </style:tab-stops>
      </style:paragraph-properties>
    </style:style>
    <style:style style:name="P70" style:family="paragraph" style:parent-style-name="Standard">
      <style:paragraph-properties fo:line-height="100%" fo:text-align="start" style:justify-single-word="false" fo:text-indent="0cm" style:auto-text-indent="false"/>
      <style:text-properties fo:text-transform="uppercase" fo:font-weight="bold" style:font-name-asian="Times New Roman1" style:font-weight-asian="bold" style:font-size-complex="14pt" style:font-weight-complex="bold"/>
    </style:style>
    <style:style style:name="P71" style:family="paragraph" style:parent-style-name="Standard">
      <style:paragraph-properties fo:margin-top="0cm" fo:margin-bottom="0.353cm" style:contextual-spacing="false" fo:line-height="115%" fo:text-indent="0cm" style:auto-text-indent="false"/>
    </style:style>
    <style:style style:name="P72" style:family="paragraph" style:parent-style-name="Standard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officeooo:paragraph-rsid="0026f5bb"/>
    </style:style>
    <style:style style:name="P73" style:family="paragraph" style:parent-style-name="Standard">
      <style:paragraph-properties fo:margin-left="0cm" fo:margin-right="0cm" fo:margin-top="0cm" fo:margin-bottom="0cm" style:contextual-spacing="false" style:line-height-at-least="0.635cm" fo:text-align="justify" style:justify-single-word="false" fo:orphans="1" fo:text-indent="1.499cm" style:auto-text-indent="false" style:writing-mode="lr-tb"/>
      <style:text-properties fo:color="#000000" loext:opacity="100%" style:font-name="Aptos" fo:font-size="12pt" fo:font-weight="normal" officeooo:paragraph-rsid="0026f5bb" loext:padding="0cm" loext:border="none"/>
    </style:style>
    <style:style style:name="P74" style:family="paragraph" style:parent-style-name="Standard">
      <style:text-properties officeooo:paragraph-rsid="0026f5bb"/>
    </style:style>
    <style:style style:name="P75" style:family="paragraph" style:parent-style-name="Standard">
      <style:text-properties officeooo:rsid="00198a42" officeooo:paragraph-rsid="0026f5bb"/>
    </style:style>
    <style:style style:name="T1" style:family="text">
      <style:text-properties fo:font-size="11pt" style:font-size-asian="11pt"/>
    </style:style>
    <style:style style:name="T2" style:family="text">
      <style:text-properties fo:font-size="9.5pt" style:font-size-asian="9.5pt" style:font-size-complex="9.5pt"/>
    </style:style>
    <style:style style:name="T3" style:family="text">
      <style:text-properties style:font-name-asian="Times New Roman1"/>
    </style:style>
    <style:style style:name="T4" style:family="text">
      <style:text-properties officeooo:rsid="000ff4d8" style:font-name-asian="Times New Roman1"/>
    </style:style>
    <style:style style:name="T5" style:family="text">
      <style:text-properties fo:color="#000000" loext:opacity="100%" style:font-name-asian="Times New Roman1">
        <loext:char-complex-color loext:theme-type="dark1" loext:color-type="theme"/>
      </style:text-properties>
    </style:style>
    <style:style style:name="T6" style:family="text">
      <style:text-properties fo:font-style="italic" style:font-name-asian="Times New Roman1" style:font-style-asian="italic" style:font-style-complex="italic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officeooo:rsid="00103301" style:font-name-complex="Times New Roman1"/>
    </style:style>
    <style:style style:name="T11" style:family="text">
      <style:text-properties style:font-name="Times New Roman" fo:font-weight="bold" style:font-weight-asian="bold" style:font-name-complex="Times New Roman1"/>
    </style:style>
    <style:style style:name="T12" style:family="text">
      <style:text-properties style:font-name="Times New Roman" fo:font-weight="bold" style:font-weight-asian="bold" style:font-name-complex="Times New Roman1" style:font-weight-complex="bold"/>
    </style:style>
    <style:style style:name="T13" style:family="text">
      <style:text-properties style:font-name="Times New Roman" fo:font-weight="bold" officeooo:rsid="000ff4d8" style:font-weight-asian="bold" style:font-name-complex="Times New Roman1" style:font-weight-complex="bold"/>
    </style:style>
    <style:style style:name="T14" style:family="text">
      <style:text-properties style:font-name="Times New Roman" fo:font-weight="bold" officeooo:rsid="000ff4d8" style:font-weight-asian="bold" style:font-name-complex="Times New Roman1"/>
    </style:style>
    <style:style style:name="T15" style:family="text">
      <style:text-properties style:font-name="Times New Roman" fo:font-style="italic" style:font-style-asian="italic" style:font-name-complex="Times New Roman1" style:font-style-complex="italic"/>
    </style:style>
    <style:style style:name="T16" style:family="text">
      <style:text-properties style:font-name="Times New Roman" fo:font-style="italic" officeooo:rsid="00103301" style:font-style-asian="italic" style:font-name-complex="Times New Roman1" style:font-style-complex="italic"/>
    </style:style>
    <style:style style:name="T17" style:family="text">
      <style:text-properties style:font-name="Times New Roman" fo:font-size="11pt" style:font-size-asian="11pt" style:font-name-complex="Times New Roman1"/>
    </style:style>
    <style:style style:name="T18" style:family="text">
      <style:text-properties style:font-name="Times New Roman" fo:font-size="10pt" style:font-size-asian="10pt" style:font-size-complex="10pt"/>
    </style:style>
    <style:style style:name="T19" style:family="text">
      <style:text-properties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03301" style:font-size-asian="12pt" style:font-size-complex="12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name-asian="Times New Roman1" style:font-weight-asian="bold" style:font-size-complex="12pt" style:font-style-complex="italic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font-name="Aptos" fo:font-size="12pt"/>
    </style:style>
    <style:style style:name="T29" style:family="text">
      <style:text-properties fo:color="#000000" loext:opacity="100%" style:font-name="Aptos" fo:font-size="12pt" loext:padding="0cm" loext:border="none"/>
    </style:style>
    <style:style style:name="T30" style:family="text">
      <style:text-properties fo:color="#000000" loext:opacity="100%" style:font-name="Aptos" fo:font-size="12pt" fo:font-style="italic" loext:padding="0cm" loext:border="none"/>
    </style:style>
    <style:style style:name="T31" style:family="text">
      <style:text-properties style:font-name="Calibri" fo:font-size="11pt" fo:font-weight="normal" style:font-size-asian="11pt" style:font-weight-asian="normal"/>
    </style:style>
    <style:style style:name="T32" style:family="text">
      <style:text-properties style:font-name="Calibri" fo:font-size="11pt" style:font-size-asian="11pt"/>
    </style:style>
    <style:style style:name="T33" style:family="text">
      <style:text-properties text:display="true"/>
    </style:style>
    <style:style style:name="T34" style:family="text">
      <style:text-properties style:font-weight-complex="bold"/>
    </style:style>
    <style:style style:name="T35" style:family="text">
      <style:text-properties style:font-name="Arial" style:font-name-complex="Arial1" style:font-size-complex="12pt"/>
    </style:style>
    <style:style style:name="T36" style:family="text">
      <style:text-properties style:font-style-complex="italic"/>
    </style:style>
    <style:style style:name="T37" style:family="text">
      <style:text-properties fo:text-transform="uppercase" fo:font-weight="bold" style:font-name-asian="Times New Roman1" style:font-weight-asian="bold" style:font-size-complex="14pt" style:font-weight-complex="bold"/>
    </style:style>
    <style:style style:name="T38" style:family="text">
      <style:text-properties fo:background-color="#00ff00" loext:char-shading-value="0"/>
    </style:style>
    <style:style style:name="T39" style:family="text">
      <style:text-properties fo:font-variant="normal" fo:text-transform="none" fo:color="#000000" loext:opacity="100%" style:font-name="Aptos" fo:font-size="12pt" fo:letter-spacing="normal" fo:font-style="normal" fo:font-weight="normal" loext:padding="0cm" loext:border="none"/>
    </style:style>
    <style:style style:name="T40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956cm, 0.416cm, 14.679cm, 0.972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 loext:marker-style-name="T3"><draw:frame draw:style-name="fr1" draw:name="Imagem 8" text:anchor-type="as-char" svg:width="2.551cm" svg:height="2.94cm" draw:z-index="0"><draw:image xlink:href="Pictures/10000000000000B6000000D2AA60D93F.png" xlink:type="simple" xlink:show="embed" xlink:actuate="onLoad" draw:mime-type="image/png"/></draw:frame><text:span text:style-name="T3"><text:s/></text:span></text:p>
      <text:p text:style-name="P56" loext:marker-style-name="T3"><text:span text:style-name="T3">Instituto </text:span><text:span text:style-name="T5">Federal</text:span><text:span text:style-name="T3"> Catarinense</text:span></text:p>
      <text:p text:style-name="P56" loext:marker-style-name="T3"><text:span text:style-name="T3"><text:s/></text:span><text:span text:style-name="T4">Técnico em Informática Integrado ao Ensino Médio</text:span></text:p>
      <text:p text:style-name="P56" loext:marker-style-name="T3"><text:span text:style-name="T6">Campus</text:span><text:span text:style-name="T3"> </text:span><text:span text:style-name="T4">Blumenau</text:span></text:p>
      <text:p text:style-name="P24" loext:marker-style-name="T9"/>
      <text:p text:style-name="P24" loext:marker-style-name="T9"/>
      <text:p text:style-name="P24" loext:marker-style-name="T9"/>
      <text:p text:style-name="P24" loext:marker-style-name="T9"/>
      <text:p text:style-name="P26" loext:marker-style-name="T12"><text:span text:style-name="T13">BENJAMIN LUIS BOLDRINI</text:span></text:p>
      <text:p text:style-name="P29" loext:marker-style-name="T12"><text:span text:style-name="T12">DIOGO FERREIRA KNOTT</text:span></text:p>
      <text:p text:style-name="P29" loext:marker-style-name="T12"><text:span text:style-name="T12">GABRIEL DE LIMA MACHADO</text:span></text:p>
      <text:p text:style-name="P29" loext:marker-style-name="T12"><text:span text:style-name="T12">LUCA VIEIRA BUGMANN </text:span></text:p>
      <text:p text:style-name="P29" loext:marker-style-name="T12"><text:span text:style-name="T12">MURILO FAVA</text:span></text:p>
      <text:p text:style-name="P29" loext:marker-style-name="T12"><text:span text:style-name="T12">NICHOLAS MANUEL GAUL</text:span></text:p>
      <text:p text:style-name="P29" loext:marker-style-name="T12"><text:span text:style-name="T12">PEDRO DA SILVA IGNOWSKI</text:span></text:p>
      <text:p text:style-name="P29" loext:marker-style-name="T12"><text:span text:style-name="T12">VITOR HENRIQUE BRANGER COELHO</text:span></text:p>
      <text:p text:style-name="P29" loext:marker-style-name="T12"><text:span text:style-name="T12"/></text:p>
      <text:p text:style-name="P31" loext:marker-style-name="T9"/>
      <text:p text:style-name="P33" loext:marker-style-name="T9"/>
      <text:p text:style-name="P33" loext:marker-style-name="T9"/>
      <text:p text:style-name="P32" loext:marker-style-name="T9"/>
      <text:p text:style-name="P26" loext:marker-style-name="T11"><text:span text:style-name="T14">INTELIGÊNCIA ARTIFICIAL NOS JOGOS</text:span></text:p>
      <text:p text:style-name="P31" loext:marker-style-name="T9"/>
      <text:p text:style-name="P31" loext:marker-style-name="T9"/>
      <text:p text:style-name="P31" loext:marker-style-name="T9"/>
      <text:p text:style-name="P31" loext:marker-style-name="T9"><text:s/></text:p>
      <text:p text:style-name="P31" loext:marker-style-name="T9"/>
      <text:p text:style-name="P31" loext:marker-style-name="T9"/>
      <text:p text:style-name="P31" loext:marker-style-name="T9"/>
      <text:p text:style-name="P31" loext:marker-style-name="T9"/>
      <text:p text:style-name="P31" loext:marker-style-name="T9"/>
      <text:p text:style-name="P29" loext:marker-style-name="T9"><text:span text:style-name="T9">Blumenau</text:span></text:p>
      <text:p text:style-name="P29" loext:marker-style-name="T9"><text:span text:style-name="T9">2026</text:span></text:p>
      <text:p text:style-name="P27" loext:marker-style-name="T12"><text:span text:style-name="T13">BENJAMIN LUIS BOLDRINI</text:span></text:p>
      <text:p text:style-name="P30" loext:marker-style-name="T12"><text:span text:style-name="T12">DIOGO FERREIRA KNOTT</text:span></text:p>
      <text:p text:style-name="P30" loext:marker-style-name="T12"><text:span text:style-name="T12">GABRIEL DE LIMA MACHADO</text:span></text:p>
      <text:p text:style-name="P30" loext:marker-style-name="T12"><text:span text:style-name="T12">LUCA VIEIRA BUGMANN </text:span></text:p>
      <text:p text:style-name="P30" loext:marker-style-name="T12"><text:span text:style-name="T12">MURILO FAVA</text:span></text:p>
      <text:p text:style-name="P30" loext:marker-style-name="T12"><text:span text:style-name="T12">NICHOLAS MANUEL GAUL</text:span></text:p>
      <text:p text:style-name="P30" loext:marker-style-name="T12"><text:span text:style-name="T12">PEDRO DA SILVA IGNOWSKI</text:span></text:p>
      <text:p text:style-name="P30" loext:marker-style-name="T12"><text:span text:style-name="T12">VITOR HENRIQUE BRANGER COELHO</text:span></text:p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5" loext:marker-style-name="T11"/>
      <text:p text:style-name="P28" loext:marker-style-name="T11"><text:span text:style-name="T14">INTELIGÊNCIA ARTIFICIAL NOS JOGOS</text:span></text:p>
      <text:p text:style-name="P31" loext:marker-style-name="T9"/>
      <text:p text:style-name="P37" loext:marker-style-name="T9"><text:span text:style-name="T9">Trabalho </text:span><text:span text:style-name="T10">par</text:span><text:span text:style-name="T9">a Disciplina </text:span><text:span text:style-name="T10">de Metodologia Cientifica</text:span><text:span text:style-name="T9"> do Instituto Federal Catarinense – </text:span><text:span text:style-name="T15">Campus </text:span><text:span text:style-name="T16">Blumenau</text:span></text:p>
      <text:p text:style-name="P25" loext:marker-style-name="T20"><text:span text:style-name="T20">Orientador: Prof.(ª). </text:span><text:span text:style-name="T21">Fani Lúcia Martendal Eberhardt, Dra.</text:span></text:p>
      <text:p text:style-name="P25" loext:marker-style-name="T22"><text:span text:style-name="T22"/></text:p>
      <text:p text:style-name="P36" loext:marker-style-name="T17"/>
      <text:p text:style-name="P58" loext:marker-style-name="T19"/>
      <text:p text:style-name="P58" loext:marker-style-name="T19"/>
      <text:p text:style-name="P58" loext:marker-style-name="T19"/>
      <text:p text:style-name="P31" loext:marker-style-name="T9"/>
      <text:p text:style-name="P31" loext:marker-style-name="T9"/>
      <text:p text:style-name="P31" loext:marker-style-name="T9"/>
      <text:p text:style-name="P31" loext:marker-style-name="T9"/>
      <text:p text:style-name="P31" loext:marker-style-name="T9"/>
      <text:p text:style-name="P31" loext:marker-style-name="T9"/>
      <text:p text:style-name="P38" loext:marker-style-name="T9"><text:span text:style-name="T9">Blumenau­</text:span></text:p>
      <text:p text:style-name="P28" loext:marker-style-name="T9"><text:span text:style-name="T10">2026</text:span></text:p>
      <text:h text:style-name="P21" text:outline-level="7" loext:marker-style-name="T19"><text:span text:style-name="T19"/></text:h>
      <text:h text:style-name="P22" text:outline-level="7" loext:marker-style-name="T19"><text:span text:style-name="T19">SUMÁRIO</text:span><text:span text:style-name="T19"/></text:h>
      <text:p text:style-name="P58" loext:marker-style-name="T19"/>
      <text:table-of-content text:style-name="Sect1" text:protected="true" text:name="Sumário1">
        <text:table-of-content-source text:outline-level="6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31"><text:a xlink:type="simple" xlink:href="#_Toc70694243" text:style-name="Index_20_Link" text:visited-style-name="Index_20_Link">1<text:span text:style-name="T31"><text:tab/></text:span>INTRODUÇÃO<text:span text:style-name="T33"><text:tab/>15</text:span></text:a></text:p>
          <text:p text:style-name="Contents_20_2" loext:marker-style-name="T32"><text:a xlink:type="simple" xlink:href="#_Toc70694244" text:style-name="Index_20_Link" text:visited-style-name="Index_20_Link">1.1<text:span text:style-name="T32"><text:tab/></text:span>RECOMENDAÇÕES DE USO<text:span text:style-name="T33"><text:tab/>15</text:span></text:a></text:p>
          <text:p text:style-name="Contents_20_2" loext:marker-style-name="T32"><text:a xlink:type="simple" xlink:href="#_Toc70694245" text:style-name="Index_20_Link" text:visited-style-name="Index_20_Link">1.2<text:span text:style-name="T32"><text:tab/></text:span>OBJETIVOS<text:span text:style-name="T33"><text:tab/>16</text:span></text:a></text:p>
          <text:p text:style-name="Contents_20_3" loext:marker-style-name="T31"><text:a xlink:type="simple" xlink:href="#_Toc70694246" text:style-name="Index_20_Link" text:visited-style-name="Index_20_Link">1.2.1<text:span text:style-name="T31"><text:tab/></text:span>Objetivo Geral<text:span text:style-name="T33"><text:tab/>16</text:span></text:a></text:p>
          <text:p text:style-name="Contents_20_3" loext:marker-style-name="T31"><text:a xlink:type="simple" xlink:href="#_Toc70694247" text:style-name="Index_20_Link" text:visited-style-name="Index_20_Link">1.2.2<text:span text:style-name="T31"><text:tab/></text:span>Objetivos Específicos<text:span text:style-name="T33"><text:tab/>16</text:span></text:a></text:p>
          <text:p text:style-name="Contents_20_1" loext:marker-style-name="T31"><text:a xlink:type="simple" xlink:href="#_Toc70694248" text:style-name="Index_20_Link" text:visited-style-name="Index_20_Link">2<text:span text:style-name="T31"><text:tab/></text:span>DESENVOLVIMENTO<text:span text:style-name="T33"><text:tab/>17</text:span></text:a></text:p>
          <text:p text:style-name="Contents_20_2" loext:marker-style-name="T32"><text:a xlink:type="simple" xlink:href="#_Toc70694249" text:style-name="Index_20_Link" text:visited-style-name="Index_20_Link">2.1<text:span text:style-name="T32"><text:tab/></text:span>EXPOSIÇÃO DO TEMA OU MATÉRIA<text:span text:style-name="T33"><text:tab/>17</text:span></text:a></text:p>
          <text:p text:style-name="Contents_20_2" loext:marker-style-name="T32"><text:a xlink:type="simple" xlink:href="#_Toc70694250" text:style-name="Index_20_Link" text:visited-style-name="Index_20_Link">2.2<text:span text:style-name="T32"><text:tab/></text:span>APRESENTAÇÃO GRÁFICA DO TRABALHO ACADÊMICO<text:span text:style-name="T33"><text:tab/>18</text:span></text:a></text:p>
          <text:p text:style-name="Contents_20_3" loext:marker-style-name="T31"><text:a xlink:type="simple" xlink:href="#_Toc70694251" text:style-name="Index_20_Link" text:visited-style-name="Index_20_Link">2.2.1<text:span text:style-name="T31"><text:tab/></text:span>Formato<text:span text:style-name="T33"><text:tab/>18</text:span></text:a></text:p>
          <text:p text:style-name="Contents_20_3" loext:marker-style-name="T31"><text:a xlink:type="simple" xlink:href="#_Toc70694252" text:style-name="Index_20_Link" text:visited-style-name="Index_20_Link">2.2.2<text:span text:style-name="T31"><text:tab/></text:span>Espaçamento<text:span text:style-name="T33"><text:tab/>19</text:span></text:a></text:p>
          <text:p text:style-name="Contents_20_3" loext:marker-style-name="T31"><text:a xlink:type="simple" xlink:href="#_Toc70694253" text:style-name="Index_20_Link" text:visited-style-name="Index_20_Link">2.2.3<text:span text:style-name="T31"><text:tab/></text:span>Indicativo de seção e numeração progressiva<text:span text:style-name="T33"><text:tab/>20</text:span></text:a></text:p>
          <text:p text:style-name="Contents_20_3" loext:marker-style-name="T31"><text:a xlink:type="simple" xlink:href="#_Toc70694254" text:style-name="Index_20_Link" text:visited-style-name="Index_20_Link">2.2.4<text:span text:style-name="T31"><text:tab/></text:span>Paginação<text:span text:style-name="T33"><text:tab/>20</text:span></text:a></text:p>
          <text:p text:style-name="Contents_20_2" loext:marker-style-name="T32"><text:a xlink:type="simple" xlink:href="#_Toc70694255" text:style-name="Index_20_Link" text:visited-style-name="Index_20_Link">2.3<text:span text:style-name="T32"><text:tab/></text:span>ILUSTRAÇOES<text:span text:style-name="T33"><text:tab/>21</text:span></text:a></text:p>
          <text:p text:style-name="Contents_20_3" loext:marker-style-name="T31"><text:a xlink:type="simple" xlink:href="#_Toc70694256" text:style-name="Index_20_Link" text:visited-style-name="Index_20_Link">2.3.1<text:span text:style-name="T31"><text:tab/></text:span>Equações e fórmulas<text:span text:style-name="T33"><text:tab/>22</text:span></text:a></text:p>
          <text:p text:style-name="Contents_20_3" loext:marker-style-name="T31"><text:a xlink:type="simple" xlink:href="#_Toc70694257" text:style-name="Index_20_Link" text:visited-style-name="Index_20_Link">2.3.2<text:span text:style-name="T31"><text:tab/></text:span>Tabela<text:span text:style-name="T33"><text:tab/>22</text:span></text:a></text:p>
          <text:p text:style-name="Contents_20_1" loext:marker-style-name="T31"><text:a xlink:type="simple" xlink:href="#_Toc70694258" text:style-name="Index_20_Link" text:visited-style-name="Index_20_Link">3<text:span text:style-name="T31"><text:tab/></text:span>OUTRAS SEÇÕES<text:span text:style-name="T33"><text:tab/>23</text:span></text:a></text:p>
          <text:p text:style-name="Contents_20_1" loext:marker-style-name="T31"><text:a xlink:type="simple" xlink:href="#_Toc70694259" text:style-name="Index_20_Link" text:visited-style-name="Index_20_Link">4<text:span text:style-name="T31"><text:tab/></text:span>CONCLUSÕES<text:span text:style-name="T33"><text:tab/>24</text:span></text:a></text:p>
          <text:p text:style-name="Contents_20_6" loext:marker-style-name="T31"><text:a xlink:type="simple" xlink:href="#_Toc70694260" text:style-name="Index_20_Link" text:visited-style-name="Index_20_Link">REFERÊNCIAS<text:span text:style-name="T33"><text:tab/>25</text:span></text:a></text:p>
          <text:p text:style-name="Contents_20_6" loext:marker-style-name="T31"><text:a xlink:type="simple" xlink:href="#_Toc70694261" text:style-name="Index_20_Link" text:visited-style-name="Index_20_Link">APÊNDICE A – Descrição<text:span text:style-name="T33"><text:tab/>27</text:span></text:a></text:p>
          <text:p text:style-name="Contents_20_6" loext:marker-style-name="T31"><text:a xlink:type="simple" xlink:href="#_Toc70694262" text:style-name="Index_20_Link" text:visited-style-name="Index_20_Link">ANEXO A – Descrição<text:span text:style-name="T33"><text:tab/>28</text:span></text:a></text:p>
        </text:index-body>
      </text:table-of-content>
      <text:p text:style-name="P58" loext:marker-style-name="T19"/>
      <text:h text:style-name="P42" text:outline-level="1"><text:s/><text:bookmark-start text:name="_Toc70694243"/><text:bookmark-start text:name="_Toc18664067"/><text:bookmark-start text:name="_Toc18663893"/>INTRODUÇÃO<text:bookmark-end text:name="_Toc70694243"/><text:bookmark-end text:name="_Toc18664067"/><text:bookmark-end text:name="_Toc18663893"/></text:h>
      <text:p text:style-name="P58" loext:marker-style-name="T19"/>
      <text:p text:style-name="P74"><text:span text:style-name="T29">O desenvolvimento das inteligências artificiais generativas têm trazido diversas mudanças, em todos os âmbitos, inclusive o da programação. Essa pesquisa visa dispor sobre os impactos dessa tecnologia, que vão desde a geração de códigos até a depuração de </text:span><text:span text:style-name="T30">bugs</text:span><text:span text:style-name="T29">, o que pode acelerar os processos e reduzir os erros.</text:span></text:p>
      <text:p text:style-name="P73">Devido a esse impacto, a pesquisa se mostra relevante no que tange sua atualidade e impacto diverso na área, dispondo-se a exemplificar tanto seus usos tanto seus benefícios e malefícios para a programação. <text:span text:style-name="T40">Em contraposto a seus benefícios diversos, a área não possui uma gama extensa de pesquisas referente ao seu uso no desenvolvimento dos jogos e sua importância em relação a experiência do usuário final.</text:span></text:p>
      <text:p text:style-name="P72"><text:span text:style-name="T39">Ao decorrer dessa pesquisa, você encontrará tópicos como: Fundamentação teórica, Impacto da IA na jogabilidade e NPC’s </text:span><text:span text:style-name="T28">e mudanças na experiência do usuário pela diferenciação do comportamento dos NPC’s</text:span> </text:p>
      <text:p text:style-name="Standard"><text:span text:style-name="T23"/></text:p>
      <text:p text:style-name="P52" loext:marker-style-name="T23"/>
      <text:h text:style-name="P46" text:outline-level="2"><text:bookmark-start text:name="_Toc18664069"/><text:bookmark-start text:name="_Toc18663895"/><text:s text:c="2"/><text:bookmark-start text:name="_Toc70694245"/>OBJETIVOS<text:bookmark-end text:name="_Toc18664069"/><text:bookmark-end text:name="_Toc18663895"/><text:bookmark-end text:name="_Toc70694245"/></text:h>
      <text:p text:style-name="P64" loext:marker-style-name="T35"/>
      <text:p text:style-name="Standard">Nas seções abaixo estão descritos o objetivo geral e os objetivos específicos da pesquisa.</text:p>
      <text:p text:style-name="Standard">Destaca-se que a utilização de subdivisões de seções na Introdução é um elemento opcional. Sugere-se seguir as orientações do curso. </text:p>
      <text:p text:style-name="P64" loext:marker-style-name="T35"/>
      <text:h text:style-name="P48" text:outline-level="3"><text:s/><text:bookmark-start text:name="_Toc70694246"/><text:bookmark-start text:name="_Toc18664070"/><text:bookmark-start text:name="_Toc18663896"/>Objetivo Geral<text:bookmark-end text:name="_Toc70694246"/><text:bookmark-end text:name="_Toc18664070"/><text:bookmark-end text:name="_Toc18663896"/></text:h>
      <text:p text:style-name="P64" loext:marker-style-name="T35"/>
      <text:p text:style-name="P75">Estudar e demonstrar os impactos da IA (Inteligência Artificial) no desenvolvimento de jogos digitais, Mostrando também seus prós e contras.</text:p>
      <text:p text:style-name="P64" loext:marker-style-name="T35"/>
      <text:h text:style-name="P48" text:outline-level="3"><text:s/><text:bookmark-start text:name="_Toc70694247"/><text:bookmark-start text:name="_Toc18664071"/><text:bookmark-start text:name="_Toc18663897"/>Objetivos Específicos<text:bookmark-end text:name="_Toc70694247"/><text:bookmark-end text:name="_Toc18664071"/><text:bookmark-end text:name="_Toc18663897"/></text:h>
      <text:p text:style-name="P65" loext:marker-style-name="T35"/>
      <text:p text:style-name="P75">a)Explorar seus usos, utilidades para o desenvolvimento de jogos digitais;</text:p>
      <text:p text:style-name="P75"/>
      <text:p text:style-name="P75">b)Identificar os pontos positivos e negativos do uso da IA;</text:p>
      <text:p text:style-name="P75"><text:soft-page-break/></text:p>
      <text:p text:style-name="P75">c)A evolução da IA nos jogos.</text:p>
      <text:p text:style-name="P7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3" text:outline-level="1"><text:s/><text:bookmark-start text:name="_Toc70694248"/><text:bookmark-start text:name="_Toc18664072"/><text:bookmark-start text:name="_Toc18663898"/>DESENVOLVIMENTO<text:bookmark-end text:name="_Toc70694248"/><text:bookmark-end text:name="_Toc18664072"/><text:bookmark-end text:name="_Toc18663898"/></text:h>
      <text:p text:style-name="Standard"/>
      <text:p text:style-name="Standard">Deve-se inserir texto entre as seções.</text:p>
      <text:p text:style-name="P58" loext:marker-style-name="T19"/>
      <text:h text:style-name="P46" text:outline-level="2"><text:s/><text:bookmark-start text:name="_Toc70694249"/><text:bookmark-start text:name="_Toc18664073"/><text:bookmark-start text:name="_Toc18663899"/>EXPOSIÇÃO DO TEMA OU MATÉRIA<text:bookmark-end text:name="_Toc70694249"/><text:bookmark-end text:name="_Toc18664073"/><text:bookmark-end text:name="_Toc18663899"/></text:h>
      <text:p text:style-name="P58" loext:marker-style-name="T19"/>
      <text:p text:style-name="Standard">É a parte principal e mais extensa do trabalho. Deve apresentar a fundamentação teórica, a metodologia, os resultados e a discussão. Divide-se em seções e subseções conforme a NBR 6024 (ABNT, 2012). </text:p>
      <text:p text:style-name="Standard">Quanto à sua estrutura e projeto gráfico, segue as recomendações da norma para preparação de trabalhos acadêmicos, a NBR 14724, de 2011 (ABNT, 2011).</text:p>
      <text:p text:style-name="Standard"/>
      <text:p text:style-name="Caption"><text:bookmark-start text:name="_Toc70694569"/>Figura <text:sequence text:ref-name="refFigure0" text:name="Figure" text:formula="ooow:Figure+1" style:num-format="1">1</text:sequence><text:s/>- Elementos do trabalho acadêmico.<text:bookmark-end text:name="_Toc70694569"/></text:p>
      <text:p text:style-name="Caption"><text:soft-page-break/><draw:frame draw:style-name="fr1" draw:name="Imagem 2" text:anchor-type="as-char" svg:width="9.624cm" svg:height="8.749cm" draw:z-index="1"><draw:image xlink:href="Pictures/1000000000000319000002D14109FE4F.png" xlink:type="simple" xlink:show="embed" xlink:actuate="onLoad" draw:mime-type="image/png"/></draw:frame></text:p>
      <text:p text:style-name="P23" loext:marker-style-name="T18"><text:span text:style-name="T18"><text:s text:c="34"/>Fonte: Sistema Integrado de Bibliotecas do IFC (2021)</text:span><text:span text:style-name="T18"/></text:p>
      <text:p text:style-name="Standard"/>
      <text:p text:style-name="Standard"/>
      <text:h text:style-name="P47" text:outline-level="2"/>
      <text:p text:style-name="Standard"/>
      <text:p text:style-name="Standard"/>
      <text:p text:style-name="Standard"/>
      <text:h text:style-name="P46" text:outline-level="2"><text:s/><text:bookmark-start text:name="_Toc70694250"/>APRESENTAÇÃO GRÁFICA DO TRABALHO ACADÊMICO<text:bookmark-end text:name="_Toc70694250"/></text:h>
      <text:p text:style-name="Standard"/>
      <text:p text:style-name="Standard">As orientações abaixo se referem a: trabalho de conclusão, monografias, dissertações e teses. Em alguns casos, são adequadas para uso na elaboração de relatórios de estágio, artigos e/ou <text:span text:style-name="T7">paper</text:span> elaborados para entrega no IFC.</text:p>
      <text:p text:style-name="P11"/>
      <text:h text:style-name="P48" text:outline-level="3"><text:bookmark-start text:name="_Toc68859166"/><text:bookmark-start text:name="_Toc303326364"/><text:bookmark-start text:name="_Toc303326658"/><text:bookmark-start text:name="_Toc372123655"/><text:bookmark-start text:name="_Toc406068137"/><text:bookmark-start text:name="_Toc77322525"/><text:s/>Formato (tipo de papel, tamanho da fonte, margens<text:bookmark-end text:name="_Toc77322525"/>)</text:h>
      <text:p text:style-name="Standard"/>
      <text:p text:style-name="P12">Apresentação gráfica de uma produção acadêmica a ser entregue na versão digital:</text:p>
      <text:list text:style-name="WWNum19">
        <text:list-item>
          <text:p text:style-name="P66">digitar o texto na cor preta. Cores somente em ilustrações como por exemplo: gráficos;</text:p>
        </text:list-item>
        <text:list-item>
          <text:p text:style-name="P66">utilizar fonte tamanho 12 para o texto;</text:p>
        </text:list-item>
        <text:list-item>
          <text:p text:style-name="P66"><text:soft-page-break/>utilizar fonte tamanho 10 para citações longas, notas de rodapé, fontes (identificação) das ilustrações e tabelas e paginação;</text:p>
        </text:list-item>
        <text:list-item>
          <text:p text:style-name="P67">optar por fontes arredondadas (<text:span text:style-name="T8">Times New Roman</text:span> ou <text:span text:style-name="T8">Arial</text:span>); </text:p>
        </text:list-item>
        <text:list-item>
          <text:p text:style-name="P66">margens: <text:s/>superior de 3 cm; <text:s/>inferior de 2 cm; <text:s/>esquerda de 3 cm; direita de 2 cm.</text:p>
        </text:list-item>
        <text:list-item>
          <text:p text:style-name="P66">inserir recuo de 2 cm, na primeira linha do parágrafo, a partir da margem esquerda;</text:p>
        </text:list-item>
        <text:list-item>
          <text:p text:style-name="P66">inserir recuo de 4 cm, a partir da margem esquerda, na citação longa (com mais de três linhas);</text:p>
        </text:list-item>
        <text:list-item>
          <text:p text:style-name="P66">digitar a nota de rodapé dentro das margens indicadas, devendo esta ficar separada do texto por um traço de<text:span text:style-name="T23"> </text:span>5 cm a partir da margem esquerda (ver seção 10);</text:p>
        </text:list-item>
        <text:list-item>
          <text:p text:style-name="P66">apresentar o texto sobre a “natureza do trabalho” localizado <text:s/>na folha de rosto e na folha de aprovação, a partir do meio da mancha gráfica para a margem direita (<text:span text:style-name="T27">Figuras</text:span> 12 e 15).</text:p>
        </text:list-item>
      </text:list>
      <text:p text:style-name="P12">Caso a produção acadêmica também seja entregue no formato impresso, observar os seguintes requisitos adicionais:</text:p>
      <text:p text:style-name="P14">a) utilizar papel branco ou reciclado, formato A4 (21,0 x 29,7 cm);</text:p>
      <text:p text:style-name="P14">b) utilizar o anverso da folha para os elementos pré-textuais;</text:p>
      <text:p text:style-name="P14">c<text:span text:style-name="T23">) </text:span>poderá ser<text:span text:style-name="T23"> </text:span>utilizado o anverso e verso da folha para impressão dos elementos textuais e pós-textuais;</text:p>
      <text:p text:style-name="P14">d) adotar as margens:</text:p>
      <text:p text:style-name="P1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Standard">- para o anverso da folha:</text:p>
            <text:p text:style-name="P16">- superior de 3 cm,</text:p>
            <text:p text:style-name="P16">- inferior de 2 cm,</text:p>
            <text:p text:style-name="P16">- esquerda de 3 cm,</text:p>
            <text:p text:style-name="P16">- direita de 2 cm.</text:p>
            <text:p text:style-name="Standard"/>
          </table:table-cell>
          <table:table-cell table:style-name="Tabela1.B1" office:value-type="string">
            <text:p text:style-name="Standard">- para o verso:</text:p>
            <text:p text:style-name="Standard"><text:tab/>- superior de 3 cm,</text:p>
            <text:p text:style-name="Standard"><text:tab/>- inferior de 2 cm,</text:p>
            <text:p text:style-name="Standard"><text:span text:style-name="T23"><text:tab/>- </text:span>esquerda de 2 cm,</text:p>
            <text:p text:style-name="Standard"><text:tab/>- direita de 3 cm.</text:p>
            <text:p text:style-name="Standard"/>
          </table:table-cell>
        </table:table-row>
      </table:table>
      <text:p text:style-name="P17"/>
      <text:p text:style-name="P17"/>
      <text:h text:style-name="P48" text:outline-level="3"><text:s/><text:bookmark-start text:name="_Toc70694252"/>Espaçamento<text:bookmark-end text:name="_Toc70694252"/><text:bookmark-end text:name="_Toc68859166"/> <text:bookmark-end text:name="_Toc303326364"/><text:bookmark-end text:name="_Toc303326658"/><text:bookmark-end text:name="_Toc372123655"/><text:bookmark-end text:name="_Toc406068137"/><text:line-break/></text:h>
      <text:p text:style-name="P12"><text:bookmark-start text:name="_Toc303326659"/><text:bookmark-start text:name="_Toc372123656"/><text:bookmark-start text:name="_Toc406068138"/><text:bookmark-start text:name="_Toc68859167"/><text:bookmark-start text:name="_Toc303326365"/>O espaçamento que você deve adotar na formatação é:</text:p>
      <text:p text:style-name="P13"><text:soft-page-break/>a) <text:s/><text:span text:style-name="T25">espaço 1,5:</text:span><text:line-break/>- todo o texto;</text:p>
      <text:p text:style-name="P14">b) <text:span text:style-name="T25">um espaço de 1,5:</text:span></text:p>
      <text:p text:style-name="P15"><text:s text:c="2"/>- separa o texto da citação longa;</text:p>
      <text:p text:style-name="P15"><text:s text:c="2"/>- separa cada título das seções e subseções do texto que os precede e que os sucede;</text:p>
      <text:p text:style-name="P6">c) <text:span text:style-name="T25">espaço simples para:</text:span></text:p>
      <text:p text:style-name="P7"><text:s text:c="4"/>- citações longas;</text:p>
      <text:p text:style-name="P7"><text:s text:c="4"/>- notas de rodapé;</text:p>
      <text:p text:style-name="P7"><text:s text:c="4"/>- referências;</text:p>
      <text:p text:style-name="P7"><text:s text:c="4"/>- legenda e fonte das ilustrações e tabelas;</text:p>
      <text:p text:style-name="P7"><text:s text:c="4"/>- natureza do trabalho;</text:p>
      <text:p text:style-name="P6">d) <text:span text:style-name="T25">um espaço simples: </text:span></text:p>
      <text:p text:style-name="P6"><text:s text:c="4"/>- entre uma referência e outra, na lista de referências ao final do trabalho.</text:p>
      <text:p text:style-name="P7"/>
      <text:h text:style-name="P48" text:outline-level="3"><text:s text:c="2"/><text:bookmark-start text:name="_Toc70694253"/>Indicativo de seção e numeração progressiva<text:bookmark-end text:name="_Toc70694253"/><text:bookmark-end text:name="_Toc303326365"/><text:bookmark-end text:name="_Toc303326659"/><text:bookmark-end text:name="_Toc372123656"/><text:bookmark-end text:name="_Toc406068138"/><text:bookmark-end text:name="_Toc68859167"/></text:h>
      <text:p text:style-name="Standard"/>
      <text:p text:style-name="P8">Seção é a divisão do TA, aplicada somente aos elementos textuais, que visa expor, numa sequência lógica, o relacionamento da matéria e permitir a sua localização. De acordo com a NBR 6024 (ABNT, 2012a), as seções também podem ser subdividas em subseções.</text:p>
      <text:p text:style-name="P8">A seção primária é a principal divisão do texto do TA, que sempre deverá ser grafada em números inteiros a partir do 1, alinhados à esquerda por um espaço de caractere, e iniciar em página distinta e ímpar (anverso). As demais são chamadas de subseções e/ou seções secundária, terciária, quaternária e quinaria. Se for necessário enumerar os diversos assuntos de uma seção que não possua título, esta deve ser subdividida em alíneas. As alíneas são ordenadas alfabeticamente e terminam em ponto e vírgula, exceto a última, que termina em ponto. <text:span text:style-name="T23">Todas as seções devem conter um t</text:span><text:span text:style-name="T25">exto relacionado a elas e só devem ser subdivididas se houver necessidade de mais duas.</text:span></text:p>
      <text:p text:style-name="P12" loext:marker-style-name="T34"><text:span text:style-name="T34">Exemplo sugerido pelo IFC:</text:span><text:span text:style-name="T34"/></text:p>
      <text:p text:style-name="Standard" loext:marker-style-name="T23"><text:span text:style-name="T23">1 <text:s/>SEÇÃO PRIMÁRIA (maiúsculas em negrito)</text:span><text:span text:style-name="T23"/></text:p>
      <text:p text:style-name="Standard">1.1 <text:s/>SEÇÃO SECUNDÁRIA (maiúsculas)</text:p>
      <text:p text:style-name="Standard" loext:marker-style-name="T23"><text:span text:style-name="T23">1.1.1 <text:s/></text:span><text:s/><text:span text:style-name="T23">Seção terciária (em negrito com primeira letra maiúscula)</text:span></text:p>
      <text:p text:style-name="Standard" loext:marker-style-name="T8">1.1.1.1 <text:span text:style-name="T8">Seção quaternária (itálico com primeira letra maiúscula)</text:span><text:span text:style-name="T8"/></text:p>
      <text:p text:style-name="Standard" loext:marker-style-name="T36"><text:soft-page-break/><text:span text:style-name="T36">1.1.1.1.1 Seção quinária (sem destaque com primeira letra maiúscula)</text:span><text:span text:style-name="T36"/></text:p>
      <text:p text:style-name="P18"><text:s text:c="14"/>a) alínea (primeira letra minúscula);</text:p>
      <text:p text:style-name="P19"><text:s text:c="14"/>b) alínea;</text:p>
      <text:p text:style-name="P19"><text:s text:c="18"/>- subalínea.</text:p>
      <text:p text:style-name="P19"><text:tab/><text:tab/><text:tab/><text:tab/><text:tab/><text:tab/><text:tab/><text:tab/><text:tab/><text:tab/><text:tab/><text:tab/><text:tab/> <text:s text:c="17"/>- subalínea</text:p>
      <text:p text:style-name="P19"><text:s text:c="14"/>c) alínea.</text:p>
      <text:p text:style-name="Standard" loext:marker-style-name="T23"><text:span text:style-name="T23">2 SEÇÃO PRIMÁRIA </text:span><text:span text:style-name="T23"/></text:p>
      <text:p text:style-name="Standard">2.1 SEÇÃO SECUNDÁRIA </text:p>
      <text:p text:style-name="Standard">2.1.1 <text:span text:style-name="T23">Seção terciária</text:span> </text:p>
      <text:p text:style-name="P58" loext:marker-style-name="T19"/>
      <text:h text:style-name="P49" text:outline-level="3"><text:s/><text:bookmark-start text:name="_Toc69732271"/><text:s/><text:bookmark-start text:name="_Toc70694254"/>Paginação<text:bookmark-end text:name="_Toc69732271"/><text:bookmark-end text:name="_Toc70694254"/></text:h>
      <text:p text:style-name="Standard"/>
      <text:p text:style-name="P12">Para o TA, as páginas pré-textuais devem ser contadas, mas não numeradas. A contagem deve iniciar a partir da folha de rosto. Já a numeração propriamente deve aparecer somente a partir da primeira folha textual, em algarismos arábicos, e ser sequencial até o final do trabalho. </text:p>
      <text:p text:style-name="P12">O número da página deve aparecer no canto superior direito da folha, a 2 cm da borda, ficando o último algarismo a 2 cm da borda direita da folha.</text:p>
      <text:p text:style-name="P12">A paginação da(s) referência(s), do(s) anexo(s) e do(s) apêndice(s) deve ser numerada sequencialmente no TA. As páginas que não permitem a inclusão de números também são contadas (mapas, documentos, ilustrações, etc.).</text:p>
      <text:p text:style-name="P12">Para trabalhos com mais de um volume, a numeração sequencial das folhas deve ser mantida. Se o trabalho contiver apêndice e anexo, a numeração das páginas deve dar sequência ao texto principal.</text:p>
      <text:p text:style-name="P2"/>
      <text:h text:style-name="P46" text:outline-level="2"><text:s/><text:bookmark-start text:name="_Toc70694255"/>ILUSTRAÇOES<text:bookmark-end text:name="_Toc70694255"/></text:h>
      <text:p text:style-name="P58" loext:marker-style-name="T19"/>
      <text:p text:style-name="Standard"><text:tab/>Independentemente do tipo de ilustração (quadro, desenho, figura, fotografia, mapa, entre outros), a sua identificação aparece na parte superior, precedida da palavra designativa. </text:p>
      <text:p text:style-name="Quote">Após a ilustração, na parte inferior, indicar a fonte consultada (elemento obrigatório, mesmo que seja produção do próprio autor), legenda, notas e outras informações <text:soft-page-break/>necessárias à sua compreensão (se houver). A ilustração deve ser citada no texto e inserida o mais próximo possível do texto a que se refere. (ABNT, 2011, p. 11).</text:p>
      <text:p text:style-name="Standard"/>
      <text:p text:style-name="Standard">Exemplo:</text:p>
      <text:p text:style-name="Caption"><text:bookmark-start text:name="_Toc70694570"/>Figura <text:sequence text:ref-name="refFigure1" text:name="Figure" text:formula="ooow:Figure+1" style:num-format="1">2</text:sequence><text:s/>- Modelo de gráfico<text:bookmark-end text:name="_Toc70694570"/></text:p>
      <text:p text:style-name="P9"/>
      <text:p text:style-name="P9"/>
      <text:p text:style-name="P9"><draw:frame draw:style-name="fr1" draw:name="Imagem 5" text:anchor-type="as-char" svg:width="12.966cm" svg:height="8.827cm" draw:z-index="2"><draw:image xlink:href="Pictures/100000000000039200000274B413D7D0.png" xlink:type="simple" xlink:show="embed" xlink:actuate="onLoad" draw:mime-type="image/png"/></draw:frame></text:p>
      <text:p text:style-name="P23" loext:marker-style-name="T18"><text:span text:style-name="T18"><text:s text:c="40"/>Fonte: Sistema Integrado de Bibliotecas do IFC (2021)</text:span><text:span text:style-name="T18"/></text:p>
      <text:p text:style-name="P9"/>
      <text:h text:style-name="P48" text:outline-level="3"><text:s/><text:bookmark-start text:name="_Toc70694256"/><text:bookmark-start text:name="_Toc18664076"/><text:bookmark-start text:name="_Toc18663902"/>Equações e fórmulas<text:bookmark-end text:name="_Toc70694256"/><text:bookmark-end text:name="_Toc18664076"/><text:bookmark-end text:name="_Toc18663902"/></text:h>
      <text:p text:style-name="P59" loext:marker-style-name="T19"/>
      <text:p text:style-name="Standard"><text:tab/>As equações e fórmulas devem ser destacadas no texto para facilitar a leitura. <text:s/>Para numerá-las, usar algarismos arábicos entre parênteses e alinhados à direita. Pode-se adotar uma entrelinha maior do que a usada no texto (ABNT, 2011).</text:p>
      <text:p text:style-name="P58" loext:marker-style-name="T19"/>
      <text:p text:style-name="Standard" loext:marker-style-name="T19"><text:span text:style-name="T19">Exemplo</text:span><text:span text:style-name="T19"/></text:p>
      <text:p text:style-name="P58" loext:marker-style-name="T19"/>
      <text:p text:style-name="P69" loext:marker-style-name="T19"><text:span text:style-name="T19">X2 + Y2 = Z2 <text:s text:c="94"/><text:tab/>(1)</text:span><text:span text:style-name="T19"/></text:p>
      <text:p text:style-name="P58" loext:marker-style-name="T19"/>
      <text:p text:style-name="P69" loext:marker-style-name="T19"><text:span text:style-name="T19">(X2 + Y2) = n<text:tab/> <text:s text:c="47"/><text:tab/><text:tab/><text:tab/><text:tab/><text:tab/><text:tab/>(2)</text:span><text:span text:style-name="T19"/></text:p>
      <text:p text:style-name="Standard" loext:marker-style-name="T19"><text:span text:style-name="T19"><text:tab/><text:tab/><text:tab/><text:tab/><text:tab/><text:tab/><text:tab/></text:span><text:span text:style-name="T19"/></text:p>
      <text:h text:style-name="P48" text:outline-level="3"><text:soft-page-break/><text:s/><text:bookmark-start text:name="_Toc70694257"/><text:bookmark-start text:name="_Toc18664077"/><text:bookmark-start text:name="_Toc18663903"/>Tabela<text:bookmark-end text:name="_Toc70694257"/><text:bookmark-end text:name="_Toc18664077"/><text:bookmark-end text:name="_Toc18663903"/> </text:h>
      <text:p text:style-name="Standard"/>
      <text:p text:style-name="Standard">De acordo com Instituto Brasileiro de Geografia e Estatística (1993), tabela é uma forma não discursiva de apresentar informações em que os números representam a informação central.</text:p>
      <text:p text:style-name="Standard">Exemplo:</text:p>
      <text:p text:style-name="Caption"><text:bookmark-start text:name="_Toc70694571"/>Figura <text:sequence text:ref-name="refFigure2" text:name="Figure" text:formula="ooow:Figure+1" style:num-format="1">3</text:sequence><text:s/>- Modelo de tabela<text:bookmark-end text:name="_Toc70694571"/></text:p>
      <text:p text:style-name="P3"><text:bookmark-start text:name="_Hlk77757828"/><draw:frame draw:style-name="fr2" draw:name="Imagem 7" text:anchor-type="as-char" svg:width="16.002cm" svg:height="9.021cm" draw:z-index="3"><draw:image xlink:href="Pictures/100000000000067500000923F92EF6BE.jpg" xlink:type="simple" xlink:show="embed" xlink:actuate="onLoad" draw:mime-type="image/jpeg"/></draw:frame><text:bookmark-end text:name="_Hlk77757828"/></text:p>
      <text:p text:style-name="P23" loext:marker-style-name="T18"><text:span text:style-name="T18"><text:s text:c="28"/>Fonte: Sistema Integrado de Bibliotecas do IFC (2021)</text:span><text:span text:style-name="T18"/></text:p>
      <text:p text:style-name="P20"/>
      <text:p text:style-name="P20"/>
      <text:h text:style-name="P43" text:outline-level="1"><text:s/><text:bookmark-start text:name="_Toc70694258"/>OUTRAS SEÇÕES<text:bookmark-end text:name="_Toc70694258"/></text:h>
      <text:p text:style-name="P58" loext:marker-style-name="T19"/>
      <text:p text:style-name="Standard">Este <text:span text:style-name="T7">template</text:span> contém algumas seções criadas na tentativa de facilitar seu uso. No entanto, não há um limite máximo ou mínimo de seção a ser utilizado no trabalho. Cabe a cada autor definir a quantidade que melhor atenda à sua necessidade. </text:p>
      <text:p text:style-name="P70" loext:marker-style-name="T37"/>
      <text:h text:style-name="P44" text:outline-level="1"><text:bookmark-start text:name="_Toc18664079"/><text:bookmark-start text:name="_Toc70694259"/><text:bookmark-start text:name="_Toc18663905"/>CONCLUS<text:bookmark-end text:name="_Toc18664079"/><text:bookmark-end text:name="_Toc18663905"/>õES<text:bookmark-end text:name="_Toc70694259"/></text:h>
      <text:p text:style-name="P60" loext:marker-style-name="T19"/>
      <text:p text:style-name="Standard">As conclusões devem responder às questões da pesquisa, em relação aos objetivos e às hipóteses/pressupostos. Devem ser breves, podendo apresentar recomendações e sugestões para trabalhos futuros.</text:p>
      <text:p text:style-name="P60" loext:marker-style-name="T19"/>
      <text:h text:style-name="P45" text:outline-level="1"><text:s/></text:h>
      <text:h text:style-name="P5" text:outline-level="6"><text:bookmark-start text:name="_Toc18664081"/><text:bookmark-start text:name="_Toc70694260"/><text:bookmark-start text:name="_Toc18663907"/>REFERÊNCIAS<text:bookmark-end text:name="_Toc18664081"/><text:bookmark-end text:name="_Toc70694260"/><text:bookmark-end text:name="_Toc18663907"/></text:h>
      <text:p text:style-name="Standard"/>
      <text:p text:style-name="P12">A NBR 6023 especifica os elementos a serem incluídos, fixa sua ordem, orienta a preparação e compilação das referências de materiais utilizados para a produção de documentos e para a inclusão em bibliografias, resumos etc. (ABNT, 2018.</text:p>
      <text:p text:style-name="P12">A palavra ‘<text:span text:style-name="T25">REFERÊNCIAS</text:span>’, no título da seção, é apresentada em letras maiúsculas e negrito, com alinhamento centralizado.</text:p>
      <text:p text:style-name="P12">Quanto à apresentação, as referências devem ser elaboradas em espaço simples, alinhadas à margem esquerda no texto e separadas entre si por uma linha em branco de espaço simples.</text:p>
      <text:p text:style-name="P12">Exemplo:</text:p>
      <text:p text:style-name="P2" loext:marker-style-name="T38"><text:span text:style-name="T38"><text:tab/></text:span><text:span text:style-name="T38"/></text:p>
      <text:p text:style-name="P2" loext:marker-style-name="T38"><draw:frame draw:style-name="fr1" draw:name="Imagem 10" text:anchor-type="as-char" svg:width="15.988cm" svg:height="9.357cm" draw:z-index="4"><draw:image xlink:href="Pictures/100000000000038A000002126798E6E3.png" xlink:type="simple" xlink:show="embed" xlink:actuate="onLoad" draw:mime-type="image/png"/></draw:frame></text:p>
      <text:p text:style-name="P23" loext:marker-style-name="T18"><text:span text:style-name="T18">Fonte: Sistema Integrado de Bibliotecas do IFC (2021)</text:span><text:span text:style-name="T18"/></text:p>
      <text:p text:style-name="P10"/>
      <text:p text:style-name="P10">ABNT. <text:span text:style-name="T25">NBR 6023</text:span>: informação e documentação: referências: elaboração. Rio de Janeiro, 2018.<text:line-break/></text:p>
      <text:p text:style-name="P10">ABNT. <text:span text:style-name="T25">NBR 6024</text:span>: informação e documentação: numeração progressiva das seções de um documento escrito: apresentação. Rio de Janeiro, 2012a. </text:p>
      <text:p text:style-name="P10"/>
      <text:p text:style-name="P10">ABNT. <text:span text:style-name="T25">NBR 6027</text:span>: informação e documentação: sumário: apresentação. Rio de Janeiro, 2012b. </text:p>
      <text:p text:style-name="P10"/>
      <text:p text:style-name="P10"><text:soft-page-break/>ABNT. <text:span text:style-name="T25">NBR 6028</text:span>: informação e documentação: resumo: apresentação. Rio de Janeiro, 2003. </text:p>
      <text:p text:style-name="P10"/>
      <text:p text:style-name="P10">ABNT. <text:span text:style-name="T25">NBR 6034</text:span>: informação e documentação: índice: apresentação. Rio de Janeiro, 2004a. </text:p>
      <text:p text:style-name="P10"/>
      <text:p text:style-name="P10">ABNT. <text:span text:style-name="T25">NBR 10520</text:span>: informação e documentação: citações em documentos: apresentação. Rio de Janeiro, 2002. </text:p>
      <text:p text:style-name="P10"/>
      <text:p text:style-name="P10">ABNT. <text:span text:style-name="T25">NBR 12225</text:span>: informação e documentação: lombada: apresentação. Rio de Janeiro, 2004b. </text:p>
      <text:p text:style-name="P10"/>
      <text:p text:style-name="P10">ABNT. <text:span text:style-name="T25">NBR 14724</text:span>: informação e documentação: trabalhos acadêmicos: apresentação. Rio de Janeiro, 2011.</text:p>
      <text:p text:style-name="P10"/>
      <text:p text:style-name="P10">SISTEMA INTEGRADO DE BIBLIOTECAS DO IFC. <text:span text:style-name="T25">Guia para elaboração de produções acadêmicas.</text:span> 3.ed. Blumenau: Instituto Federal Catarinense, 2021. No prelo.</text:p>
      <text:p text:style-name="P10"/>
      <text:p text:style-name="P58" loext:marker-style-name="T19"/>
      <text:p text:style-name="P61" loext:marker-style-name="T19"/>
      <text:h text:style-name="P5" text:outline-level="6"><text:bookmark-start text:name="_Toc18664082"/><text:bookmark-start text:name="_Toc70694261"/><text:bookmark-start text:name="_Toc18663908"/>APÊND­ICE A – Descrição<text:bookmark-end text:name="_Toc18664082"/><text:bookmark-end text:name="_Toc70694261"/><text:bookmark-end text:name="_Toc18663908"/></text:h>
      <text:p text:style-name="Standard"/>
      <text:p text:style-name="Standard">Textos elaborados pelo autor, a fim de completar a sua argumentação. Deve ser precedido da palavra APÊNDICE, identificada por letras maiúsculas consecutivas, travessão e pelo respectivo título. Utilizam-se letras maiúsculas dobradas quando esgotadas as letras do alfabeto.</text:p>
      <text:p text:style-name="Standard" loext:marker-style-name="T19"><text:span text:style-name="T19">Exemplo:</text:span><text:span text:style-name="T19"/></text:p>
      <text:p text:style-name="P71" loext:marker-style-name="T26"><draw:frame draw:style-name="fr1" draw:name="Imagem 1" text:anchor-type="as-char" svg:width="15.628cm" svg:height="8.62cm" draw:z-index="5"><draw:image xlink:href="Pictures/100000000000034B000001D1755221CC.png" xlink:type="simple" xlink:show="embed" xlink:actuate="onLoad" draw:mime-type="image/png"/></draw:frame></text:p>
      <text:h text:style-name="P5" text:outline-level="6"><text:bookmark-start text:name="_Toc18664083"/><text:bookmark-start text:name="_Toc70694262"/><text:bookmark-start text:name="_Toc18663909"/>ANEXO A – Descrição<text:bookmark-end text:name="_Toc18664083"/><text:bookmark-end text:name="_Toc70694262"/><text:bookmark-end text:name="_Toc18663909"/></text:h>
      <text:p text:style-name="P58" loext:marker-style-name="T19"/>
      <text:p text:style-name="Standard">São documentos não elaborados pelo autor que servem como fundamentação (mapas, leis, estatutos). Deve ser precedido da palavra ANEXO, identificada por letras maiúsculas consecutivas, travessão e pelo respectivo título. Utilizam-se letras maiúsculas dobradas quando esgotadas as letras do alfabeto.</text:p>
      <text:p text:style-name="P58" loext:marker-style-name="T19"/>
      <text:p text:style-name="Standard" loext:marker-style-name="T19"><text:span text:style-name="T19">Exemplo:</text:span><text:span text:style-name="T19"/></text:p>
      <text:p text:style-name="P58" loext:marker-style-name="T19"/>
      <text:p text:style-name="P9" loext:marker-style-name="T19"><draw:frame draw:style-name="fr1" draw:name="Imagem 11" text:anchor-type="as-char" svg:width="14.781cm" svg:height="9.102cm" draw:z-index="6"><draw:image xlink:href="Pictures/100000000000034600000204B89480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, 'Aptos EmbeddedFont', 'Aptos MSFontService', Calibri, Helvetica, sans-serif"/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next-style-name="Standard" style:auto-update="true" style:class="extra">
      <style:paragraph-properties fo:line-height="100%" fo:text-align="center" style:justify-single-word="false" fo:text-indent="0cm" style:auto-text-indent="false"/>
      <style:text-properties fo:font-size="10pt" style:font-size-asian="10pt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class="text">
      <style:paragraph-properties fo:margin-left="0cm" fo:text-align="start" style:justify-single-word="false" fo:keep-together="always" fo:text-indent="0cm" style:auto-text-indent="false" fo:keep-with-next="always">
        <style:tab-stops>
          <style:tab-stop style:position="0.3cm"/>
        </style:tab-stops>
      </style:paragraph-properties>
      <style:text-properties fo:text-transform="uppercase" fo:font-weight="bold" style:font-name-asian="Times New Roman1" style:font-family-asian="'Times New Roman'" style:font-family-generic-asian="system" style:font-pitch-asian="variable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class="text">
      <style:paragraph-properties fo:margin-left="0cm" fo:margin-top="0.212cm" fo:margin-bottom="0.212cm" style:contextual-spacing="false" fo:text-align="start" style:justify-single-word="false" fo:keep-together="always" fo:text-indent="0cm" style:auto-text-indent="false" fo:keep-with-next="always">
        <style:tab-stops>
          <style:tab-stop style:position="0.3cm"/>
        </style:tab-stops>
      </style:paragraph-properties>
      <style:text-properties fo:text-transform="uppercase" style:font-name-asian="Times New Roman1" style:font-family-asian="'Times New Roman'" style:font-family-generic-asian="system" style:font-pitch-asian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ítulo_20_3_20_Char" style:default-outline-level="3" style:class="text">
      <style:paragraph-properties fo:margin-left="0cm" fo:text-align="start" style:justify-single-word="false" fo:keep-together="always" fo:text-indent="0cm" style:auto-text-indent="false" fo:keep-with-next="always">
        <style:tab-stops>
          <style:tab-stop style:position="0.3cm"/>
        </style:tab-stops>
      </style:paragraph-properties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next-style-name="Standard" loext:linked-style-name="Título_20_4_20_Char" style:auto-update="true" style:default-outline-level="4" style:class="text">
      <style:paragraph-properties fo:margin-left="0cm" fo:text-align="start" style:justify-single-word="false" fo:keep-together="always" fo:text-indent="0cm" style:auto-text-indent="false" fo:keep-with-next="always">
        <style:tab-stops>
          <style:tab-stop style:position="0.3cm"/>
        </style:tab-stops>
      </style:paragraph-properties>
      <style:text-properties fo:font-style="italic" style:font-name-asian="Times New Roman1" style:font-family-asian="'Times New Roman'" style:font-family-generic-asian="system" style:font-pitch-asian="variable" style:font-style-asian="italic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Título_20_5_20_Char" style:auto-update="true" style:default-outline-level="5" style:class="text">
      <style:paragraph-properties fo:margin-left="0cm" fo:text-align="start" style:justify-single-word="false" fo:keep-together="always" fo:text-indent="0cm" style:auto-text-indent="false" fo:keep-with-next="always">
        <style:tab-stops>
          <style:tab-stop style:position="0.3cm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tyle-complex="italic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tyle-complex="italic"/>
    </style:style>
    <style:style style:name="Heading_20_8" style:display-name="Heading 8" style:family="paragraph" style:parent-style-name="Standard" style:next-style-name="Standard" loext:linked-style-name="Título_20_8_20_Char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Heading_20_9" style:display-name="Heading 9" style:family="paragraph" style:parent-style-name="Standard" style:next-style-name="Standard" loext:linked-style-name="Título_20_9_20_Char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size-complex="10pt" style:font-style-complex="italic"/>
    </style:style>
    <style:style style:name="Parágrafo_20_da_20_Lista1" style:display-name="Parágrafo da Lista1" style:family="paragraph" style:parent-style-name="Standard">
      <style:text-properties style:font-name-asian="Times New Roman1" style:font-family-asian="'Times New Roman'" style:font-family-generic-asian="system" style:font-pitch-asian="variable" style:language-asian="en" style:country-asian="US" style:font-size-complex="12pt"/>
    </style:style>
    <style:style style:name="Quote" style:family="paragraph" style:parent-style-name="Standard" style:next-style-name="Standard" loext:linked-style-name="Citação_20_Char" style:auto-update="true">
      <style:paragraph-properties fo:margin-left="4.001cm" fo:line-height="100%" fo:text-indent="0cm" style:auto-text-indent="false"/>
      <style:text-properties fo:font-size="10pt" style:font-size-asian="10pt" style:font-style-complex="italic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cm" fo:margin-bottom="0.176cm" style:contextual-spacing="false" fo:text-indent="0cm" style:auto-text-indent="false">
        <style:tab-stops>
          <style:tab-stop style:position="2cm"/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text-align="start" style:justify-single-word="false" fo:text-indent="0cm" style:auto-text-indent="false">
        <style:tab-stops>
          <style:tab-stop style:position="0cm"/>
          <style:tab-stop style:position="2cm"/>
          <style:tab-stop style:position="16.00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top="0cm" fo:margin-bottom="0.176cm" style:contextual-spacing="false" fo:text-indent="0cm" style:auto-text-indent="false">
        <style:tab-stops>
          <style:tab-stop style:position="2cm"/>
          <style:tab-stop style:position="16.00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top="0cm" fo:margin-bottom="0.176cm" style:contextual-spacing="false" fo:text-indent="0cm" style:auto-text-indent="false">
        <style:tab-stops>
          <style:tab-stop style:position="2cm"/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/>
      <style:text-properties fo:color="#ae9638" loext:opacity="100%" style:font-name="Cambria" fo:font-family="Cambria" style:font-family-generic="roman" style:font-pitch="variable" fo:font-size="14pt" style:font-size-asian="14pt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 style:font-weight-asian="bold"/>
    </style:style>
    <style:style style:name="No_20_Spacing" style:display-name="No Spacing" style:family="paragraph" style:auto-update="true" style:list-style-name="WWNum14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size-complex="11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top="0cm" fo:margin-bottom="0.176cm" style:contextual-spacing="false" fo:text-indent="0cm" style:auto-text-indent="false">
        <style:tab-stops>
          <style:tab-stop style:position="2cm"/>
          <style:tab-stop style:position="16.002cm" style:type="right" style:leader-style="dotted" style:leader-text="."/>
        </style:tab-stops>
      </style:paragraph-properties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_20_Index_20_1" style:display-name="Figure Index 1" style:family="paragraph" style:parent-style-name="Standard" style:next-style-name="Standard" style:class="index"/>
    <style:style style:name="List_20_Paragraph" style:display-name="List Paragraph" style:family="paragraph" style:parent-style-name="Standard" style:next-style-name="Standard" style:auto-update="true">
      <style:paragraph-properties fo:margin-top="0cm" fo:margin-bottom="0cm" style:contextual-spacing="true" fo:line-height="100%" fo:text-align="center" style:justify-single-word="false" fo:text-indent="0cm" style:auto-text-indent="false"/>
    </style:style>
    <style:style style:name="Marginalia" style:family="paragraph" style:parent-style-name="Standard" loext:linked-style-name="Texto_20_de_20_comentário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fo:font-weight="bold" style:font-weight-asian="bold" style:font-weight-complex="bold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ceb966"/>
      <style:text-properties fo:color="#4e4d51" loext:opacity="100%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font-size-complex="26pt"/>
    </style:style>
    <style:style style:name="Footnote" style:family="paragraph" style:parent-style-name="Standard" loext:linked-style-name="Texto_20_de_20_nota_20_de_20_rodapé_20_Char" style:class="extra">
      <style:paragraph-properties fo:line-height="100%"/>
      <style:text-properties fo:font-size="10pt" style:font-size-asian="10pt" style:font-size-complex="10pt"/>
    </style:style>
    <style:style style:name="Nota_20_de_20_Rodapé" style:display-name="Nota de Rodapé" style:family="paragraph" style:parent-style-name="Footnote" loext:linked-style-name="Nota_20_de_20_Rodapé_20_Char" style:auto-update="true">
      <style:paragraph-properties fo:margin-left="0.199cm" fo:text-align="start" style:justify-single-word="false" fo:text-indent="-0.199cm" style:auto-text-indent="false"/>
    </style:style>
    <style:style style:name="Standard_20__28_WW_29_" style:display-name="Standard (WW)" style:family="paragraph">
      <style:paragraph-properties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style:writing-mode="lr-tb"/>
      <style:text-properties style:font-name="Arial" fo:font-family="Arial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text-indent="0cm" style:auto-text-indent="false"/>
    </style:style>
    <style:style style:name="Padrão" style:family="paragraph">
      <style:paragraph-properties fo:margin-top="0cm" fo:margin-bottom="0.353cm" style:contextual-spacing="false" fo:line-height="150%" fo:text-align="start" style:justify-single-word="false" fo:orphans="2" fo:widows="2" fo:hyphenation-ladder-count="no-limit" fo:text-indent="1.499cm" style:auto-text-indent="false" fo:keep-with-next="always" style:vertical-align="baseline" style:writing-mode="lr-tb">
        <style:tab-stops>
          <style:tab-stop style:position="1.27cm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Padrão">
      <style:paragraph-properties fo:margin-top="0.049cm" fo:margin-bottom="0.049cm" style:contextual-spacing="false" style:line-height-at-least="0.176cm" fo:text-indent="0cm" style:auto-text-indent="false"/>
      <style:text-properties style:letter-kerning="fals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Pa13" style:family="paragraph" style:parent-style-name="Standard" style:next-style-name="Standard">
      <style:paragraph-properties style:line-height-at-least="0.425cm" fo:text-align="start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font-size-complex="12pt"/>
    </style:style>
    <style:style style:name="CP-CapaOrientador" style:family="paragraph" style:next-style-name="Standard">
      <style:paragraph-properties fo:margin-left="10.502cm" fo:margin-top="0.423cm" fo:margin-bottom="0cm" style:contextual-spacing="false" fo:text-align="start" style:justify-single-word="false" fo:orphans="0" fo:widows="0" fo:hyphenation-ladder-count="no-limit" fo:text-indent="-2.501cm" style:auto-text-indent="false" style:writing-mode="lr-tb">
        <style:tab-stops>
          <style:tab-stop style:position="10.502cm"/>
        </style:tab-stops>
      </style:paragraph-properties>
      <style:text-properties style:font-name="Times New Roman" fo:font-family="'Times New Roman'" style:font-family-generic="roman" style:font-pitch="variable" fo:font-size="13pt" style:letter-kerning="true" style:font-name-asian="Times New Roman1" style:font-family-asian="'Times New Roman'" style:font-family-generic-asian="system" style:font-pitch-asian="variable" style:font-size-asian="13pt" style:language-asian="zh" style:country-asian="C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" style:family="paragraph" style:parent-style-name="Standard" style:class="extra">
      <style:text-properties style:font-name="Arial" fo:font-family="Arial" style:font-family-generic="roman" style:font-pitch="variable" style:language-asian="en" style:country-asian="US"/>
    </style:style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text-transform="uppercase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weight-complex="bold"/>
    </style:style>
    <style:style style:name="Título_20_2_20_Char" style:display-name="Título 2 Char" style:family="text">
      <style:text-properties fo:text-transform="uppercas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3pt" style:font-weight-complex="bold"/>
    </style:style>
    <style:style style:name="Título_20_3_20_Char" style:display-name="Título 3 Char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1pt" style:font-weight-complex="bold"/>
    </style:style>
    <style:style style:name="Título_20_4_20_Char" style:display-name="Título 4 Char" style:family="tex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1pt" style:font-style-complex="italic" style:font-weight-complex="bold"/>
    </style:style>
    <style:style style:name="Título_20_5_20_Char" style:display-name="Título 5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1pt"/>
    </style:style>
    <style:style style:name="Título_20_6_20_Char" style:display-name="Título 6 Char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itação_20_Char" style:display-name="Citação Char" style:family="text" loext:linked-style-name="Quote">
      <style:text-properties style:font-name="Times New Roman" fo:font-family="'Times New Roman'" style:font-family-generic="roman" style:font-pitch="variable" style:font-size-complex="11pt" style:font-style-complex="italic"/>
    </style:style>
    <style:style style:name="Título_20_7_20_Char" style:display-name="Título 7 Char" style:family="text">
      <style:text-properties style:font-name="Arial" fo:font-family="Arial" style:font-family-generic="roman" style:font-pitch="variable" fo:font-size="10.5pt" fo:font-weight="bold" style:font-name-asian="Times New Roman1" style:font-family-asian="'Times New Roman'" style:font-family-generic-asian="system" style:font-pitch-asian="variable" style:font-size-asian="10.5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Título_20_8_20_Char" style:display-name="Título 8 Char" style:family="text">
      <style:text-properties fo:color="#404040" loext:opacity="100%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9_20_Char" style:display-name="Título 9 Char" style:family="text">
      <style:text-properties fo:color="#404040" loext:opacity="100%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Texto_20_de_20_balão_20_Char" style:display-name="Texto de balão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>
      <style:text-properties style:font-name="Arial" fo:font-family="Arial" style:font-family-generic="roman" style:font-pitch="variable" fo:font-size="10.5pt" style:font-size-asian="10.5pt"/>
    </style:style>
    <style:style style:name="Rodapé_20_Char" style:display-name="Rodapé Char" style:family="text">
      <style:text-properties style:font-name="Arial" fo:font-family="Arial" style:font-family-generic="roman" style:font-pitch="variable" fo:font-size="10.5pt" style:font-size-asian="10.5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Assunto_20_do_20_comentário_20_Char" style:display-name="Assunto do comentário Char" style:family="text" loext:linked-style-name="annotation_20_subjec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ítulo_20_Char" style:display-name="Título Char" style:family="text">
      <style:text-properties fo:color="#4e4d51" loext:opacity="100%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Visited_20_Internet_20_Link" style:display-name="Visited Internet Link" style:family="text">
      <style:text-properties fo:color="#932968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family="'Times New Roman'" style:font-family-generic="roman" style:font-pitch="variable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Nota_20_de_20_Rodapé_20_Char" style:display-name="Nota de Rodapé Char" style:family="text" style:parent-style-name="Texto_20_de_20_nota_20_de_20_rodapé_20_Char" loext:linked-style-name="Nota_20_de_20_Rodapé">
      <style:text-properties style:font-name="Times New Roman" fo:font-family="'Times New Roman'" style:font-family-generic="roman" style:font-pitch="variable"/>
    </style:style>
    <style:style style:name="Menção_20_Pendente1" style:display-name="Menção Pendente1" style:family="text" style:parent-style-name="Default_20_Paragraph_20_Font">
      <style:text-properties fo:color="#605e5c" loext:opacity="100%" fo:background-color="#e1dfdd"/>
    </style:style>
    <style:style style:name="WW8Num7z1" style:family="text"/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pt" fo:letter-spacing="normal" style:rfc-language-tag="x-none" fo:font-style="normal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size-complex="1pt" style:rfc-language-tag-complex="x-none" style:font-style-complex="normal" style:font-weight-complex="normal" style:text-emphasize="none" style:text-scale="100%" text:display="true" loext:padding="0cm" loext:border="none" loext:shadow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weight="normal" style:font-weight-asian="normal" style:font-weight-complex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use-window-font-color="true" loext:opacity="0%" fo:font-size="12pt" style:font-size-asian="12pt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8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5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2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9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6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3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0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1.1" style:num-suffix=".1.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1.1.1" style:num-suffix=".1.1.1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1.1.1.1" style:num-suffix=".1.1.1.1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4.27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906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9.541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10.54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bullet text:level="2" text:style-name="ListLabel_20_6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44cm"/>
        </style:list-level-properties>
        <style:text-properties style:font-name="Symbol1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4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4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4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4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1"/>
      </text:list-level-style-bullet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1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style:font-size-asian="11pt"/>
    </style:style>
    <style:style style:name="MP2" style:family="paragraph" style:parent-style-name="Header">
      <style:paragraph-properties fo:text-indent="0cm" style:auto-text-indent="false"/>
      <style:text-properties fo:font-size="9.5pt" style:font-size-asian="9.5pt" style:font-size-complex="9.5pt"/>
    </style:style>
    <style:style style:name="MP3" style:family="paragraph" style:parent-style-name="Footer">
      <style:paragraph-properties fo:text-indent="0cm" style:auto-text-indent="false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font-size="11pt" style:font-size-asian="11pt"/>
    </style:style>
    <style:style style:name="MT2" style:family="text">
      <style:text-properties fo:font-size="9.5pt" style:font-size-asian="9.5pt" style:font-size-complex="9.5pt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 style:page-usage="right">
      <style:page-layout-properties fo:page-width="21.001cm" fo:page-height="29.7cm" style:num-format="1" style:paper-tray-name="[From printer settings]" style:print-orientation="portrait" fo:margin-top="1cm" fo:margin-bottom="1cm" fo:margin-left="3cm" fo:margin-right="2cm" fo:border="none" fo:padding="0cm" style:shadow="none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 style:page-usage="right">
      <style:page-layout-properties fo:page-width="21.001cm" fo:page-height="29.7cm" style:num-format="1" style:paper-tray-name="[From printer settings]" style:print-orientation="portrait" fo:margin-top="2cm" fo:margin-bottom="2cm" fo:margin-left="3cm" fo:margin-right="2cm" fo:border="none" fo:padding="0cm" style:shadow="none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fill="solid" draw:background-size="full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 loext:marker-style-name="MT1"/>
        <text:p text:style-name="Header"/>
      </style:header>
      <style:header-left>
        <text:p text:style-name="MP2" loext:marker-style-name="MT2"/>
        <text:p text:style-name="Header"/>
      </style:header-left>
      <style:footer>
        <text:p text:style-name="Footer">[Digite texto]</text:p>
        <text:p text:style-name="MP3"/>
      </style:footer>
      <style:footer-left>
        <text:p text:style-name="Footer"/>
      </style:footer-left>
    </style:master-page>
    <style:master-page style:name="Converted1" style:page-layout-name="Mpm2" draw:style-name="Mdp2" style:next-style-name="Standard">
      <style:header>
        <text:p text:style-name="MP1" loext:marker-style-name="MT1"/>
        <text:p text:style-name="Header"/>
      </style:header>
      <style:header-left>
        <text:p text:style-name="MP2" loext:marker-style-name="MT2"/>
        <text:p text:style-name="Header"/>
      </style:header-left>
      <style:header-first>
        <text:p text:style-name="Header"/>
      </style:header-first>
      <style:footer>
        <text:p text:style-name="Footer">[Digite texto]</text:p>
        <text:p text:style-name="MP3"/>
      </style:footer>
      <style:footer-left>
        <text:p text:style-name="Footer"/>
      </style:footer-left>
      <style:footer-first>
        <text:p text:style-name="MP3"/>
      </style:footer-first>
    </style:master-page>
    <style:master-page style:name="Converted2" style:page-layout-name="Mpm3" draw:style-name="Mdp1">
      <style:header>
        <text:p text:style-name="MP4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3" style:page-layout-name="Mpm3" draw:style-name="Mdp1">
      <style:header>
        <text:p text:style-name="MP4" loext:marker-style-name="MT1"><text:page-number text:select-page="current">27</text:page-number></text:p>
      </style:header>
      <style:header-left>
        <text:p text:style-name="MP4" loext:marker-style-name="MT1"><text:page-number text:select-page="current">26</text:page-number></text:p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4" style:page-layout-name="Mpm4" draw:style-name="Mdp2" style:next-style-name="Converted3">
      <style:header>
        <text:p text:style-name="MP4" loext:marker-style-name="MT1"><text:page-number text:select-page="current">15</text:page-number></text:p>
      </style:header>
      <style:header-left>
        <text:p text:style-name="MP4" loext:marker-style-name="MT1"><text:page-number text:select-page="current">0</text:page-number></text:p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dson</meta:initial-creator>
    <meta:editing-cycles>6</meta:editing-cycles>
    <meta:print-date>2016-07-27T18:26:00</meta:print-date>
    <meta:creation-date>2026-04-11T18:23:00</meta:creation-date>
    <dc:date>2026-06-02T11:41:37.906000000</dc:date>
    <meta:editing-duration>PT32M24S</meta:editing-duration>
    <meta:generator>LibreOffice/24.2.4.2$Windows_X86_64 LibreOffice_project/51a6219feb6075d9a4c46691dcfe0cd9c4fff3c2</meta:generator>
    <meta:document-statistic meta:table-count="1" meta:image-count="7" meta:object-count="0" meta:page-count="17" meta:paragraph-count="190" meta:word-count="1861" meta:character-count="12082" meta:non-whitespace-character-count="9982"/>
    <meta:user-defined meta:name="AppVersion">16.0000</meta:user-defined>
    <meta:user-defined meta:name="Company">Hewlett-Packard Company</meta:user-defined>
    <meta:template xlink:type="simple" xlink:actuate="onRequest" xlink:title="Normal.dotm" xlink:href=""/>
  </office:meta>
</office:document-meta>
</file>